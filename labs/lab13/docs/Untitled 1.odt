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officeooo:rsid="0019a0a6" officeooo:paragraph-rsid="0019a0a6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Linux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04:46:32.417494184</meta:creation-date>
    <dc:date>2026-05-15T04:47:22.074078896</dc:date>
    <meta:editing-duration>PT5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5.8.6.2$Linux_X86_64 LibreOffice_project/580$Build-2</meta:generator>
  </office:meta>
</office:document-meta>
</file>