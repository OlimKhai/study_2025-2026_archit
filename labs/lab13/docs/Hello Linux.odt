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ddf" officeooo:paragraph-rsid="00154ddf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Hello, Linux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5T04:40:38.734658797</meta:creation-date>
    <dc:date>2026-05-15T04:41:07.114167667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25.8.6.2$Linux_X86_64 LibreOffice_project/580$Build-2</meta:generator>
  </office:meta>
</office:document-meta>
</file>